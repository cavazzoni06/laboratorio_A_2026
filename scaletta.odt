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cbc" officeooo:paragraph-rsid="00037cbc"/>
    </style:style>
    <style:style style:name="P2" style:family="paragraph" style:parent-style-name="Standard">
      <style:text-properties officeooo:rsid="00050a06" officeooo:paragraph-rsid="00050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 DA CREARE</text:p>
      <text:p text:style-name="P1">Film</text:p>
      <text:p text:style-name="P1">Utente (e le sue estensioni Cliente, Proiezionista, Bigliettaio, Guest)</text:p>
      <text:p text:style-name="P1">Prenotazione</text:p>
      <text:p text:style-name="P1"/>
      <text:p text:style-name="P1">FILE DA CREARE</text:p>
      <text:p text:style-name="P1">proiezioni</text:p>
      <text:p text:style-name="P1">utenti</text:p>
      <text:p text:style-name="P1">prenotazioni</text:p>
      <text:p text:style-name="P1"/>
      <text:p text:style-name="P2">STEP 1</text:p>
      <text:p text:style-name="P2">implementare lettura e scrittura da file proiezioni (dentro la classe Film)</text:p>
      <text:p text:style-name="P2"/>
      <text:p text:style-name="P2">STEP 2</text:p>
      <text:p text:style-name="P2">Login e registrazione (utilizzare HASH <text:s/>per password nascosta)</text:p>
      <text:p text:style-name="P2"/>
      <text:p text:style-name="P2">STEP 3</text:p>
      <text:p text:style-name="P2">Ricerca proiezioni</text:p>
      <text:p text:style-name="P2">Per titolo, genere, intervallo di date, costo</text:p>
      <text:p text:style-name="P2"/>
      <text:p text:style-name="P2">STEP 4</text:p>
      <text:p text:style-name="P2">Gestione prenotazioni</text:p>
      <text:p text:style-name="P2">Controlli da implementare: posti disponibili, codice univoco</text:p>
      <text:p text:style-name="P2"/>
      <text:p text:style-name="P2">STEP 5</text:p>
      <text:p text:style-name="P2">Gestione proiezioni</text:p>
      <text:p text:style-name="P2">Controlli: no sovrapposizioni e no modifica/cancellazione se ci sono già delle prenotazioni</text:p>
      <text:p text:style-name="P2"/>
      <text:p text:style-name="P2">STEP 6</text:p>
      <text:p text:style-name="P2">Gestione eccezioni</text:p>
      <text:p text:style-name="P2"/>
      <text:p text:style-name="P2">STEP 7</text:p>
      <text:p text:style-name="P2">Javadoc</text:p>
      <text:p text:style-name="P2"/>
      <text:p text:style-name="P2">STEP 8</text:p>
      <text:p text:style-name="P2">Stesura manuale utente e tecni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3:29:03.564858500</meta:creation-date>
    <dc:date>2026-05-19T13:41:49.805658200</dc:date>
    <meta:editing-duration>PT12M46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27" meta:word-count="95" meta:character-count="641" meta:non-whitespace-character-count="572"/>
  </office:meta>
</office:document-meta>
</file>